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svg:stroke-color="#3465a4" draw:stroke-linejoin="none" svg:stroke-linecap="butt" draw:fill="solid" draw:fill-color="#999999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cccccc" draw:textarea-horizontal-align="center" draw:textarea-vertical-align="middle"/>
    </style:style>
    <style:style style:name="gr3" style:family="graphic" style:parent-style-name="Heading_20_A0">
      <style:graphic-properties draw:textarea-horizontal-align="left" draw:auto-grow-height="true" draw:auto-grow-width="false" fo:min-height="3.46cm" fo:min-width="0cm"/>
      <style:paragraph-properties style:writing-mode="lr-tb"/>
    </style:style>
    <style:style style:name="gr4" style:family="graphic" style:parent-style-name="standard">
      <style:graphic-properties svg:stroke-color="#000000" draw:fill-color="#00a933" draw:textarea-horizontal-align="justify" draw:textarea-vertical-align="middle" draw:auto-grow-height="false" fo:min-height="0.658cm" fo:min-width="0.45cm"/>
    </style:style>
    <style:style style:name="gr5" style:family="graphic" style:parent-style-name="standard">
      <style:graphic-properties svg:stroke-color="#000000" draw:fill-color="#ff0000" draw:textarea-horizontal-align="justify" draw:textarea-vertical-align="middle" draw:auto-grow-height="false" fo:min-height="2.55cm" fo:min-width="1.4cm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cccccc"/>
      <style:paragraph-properties fo:text-align="end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998cm" svg:height="1.709cm" svg:x="9.301cm" svg:y="2cm" svg:viewBox="0 0 1999 1710" svg:d="M1763 326h-726-37v-162c0-90-77-164-171-164h-385c-94 0-170 74-170 164v162h-38c-130 0-236 102-236 226v932c0 125 106 226 236 226h1527c130 0 236-101 236-226v-932c0-124-106-226-236-226zM423 164c0-11 10-21 21-21h385c11 0 21 10 21 22v161h-427zM1763 1567h-1527c-48 0-87-38-87-83v-932c0-45 39-83 87-83h54 133 427 187 726c48 0 87 38 87 83v932c0 45-39 83-87 83z">
          <text:p/>
        </draw:path>
        <draw:path draw:style-name="gr2" draw:text-style-name="P2" draw:layer="layout" svg:width="0.926cm" svg:height="0.889cm" svg:x="9.794cm" svg:y="2.566cm" svg:viewBox="0 0 927 890" svg:d="M463 0c-255 0-463 200-463 445 0 246 208 445 463 445 256 0 464-199 464-445 0-245-208-445-464-445zM463 747c-173 0-314-136-314-302s141-302 314-302 314 136 314 302c0 167-141 302-314 302z">
          <text:p/>
        </draw:path>
        <draw:polygon draw:style-name="gr2" draw:text-style-name="P3" draw:layer="layout" svg:width="0.19cm" svg:height="0.142cm" svg:x="10.869cm" svg:y="2.588cm" svg:viewBox="0 0 191 143" draw:points="0,0 191,0 191,143 0,143">
          <text:p/>
        </draw:polygon>
        <draw:frame draw:style-name="gr3" draw:text-style-name="P4" draw:layer="layout" svg:width="2.6cm" svg:height="3.46cm" svg:x="8.3cm" svg:y="0.5cm">
          <draw:text-box>
            <text:p>X</text:p>
          </draw:text-box>
        </draw:frame>
        <draw:custom-shape draw:style-name="gr4" draw:text-style-name="P5" draw:layer="layout" svg:width="1.9cm" svg:height="2.8cm" svg:x="10.1cm" svg:y="9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6" draw:layer="layout" svg:width="1.9cm" svg:height="2.8cm" svg:x="8.2cm" svg:y="9.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6-06-10T20:23:42.446000000</meta:creation-date>
    <dc:date>2026-06-17T00:43:14.828000000</dc:date>
    <meta:editing-duration>PT37M56S</meta:editing-duration>
    <meta:editing-cycles>2</meta:editing-cycles>
    <meta:generator>LibreOffice/6.3.4.2$Windows_X86_64 LibreOffice_project/60da17e045e08f1793c57c00ba83cdfce946d0aa</meta:generator>
    <meta:document-statistic meta:object-count="6"/>
  </office:meta>
</office:document-meta>
</file>